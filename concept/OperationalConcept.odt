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73b" officeooo:paragraph-rsid="000f373b"/>
    </style:style>
    <style:style style:name="P2" style:family="paragraph" style:parent-style-name="Standard">
      <style:text-properties officeooo:rsid="002b0b32" officeooo:paragraph-rsid="00479381"/>
    </style:style>
    <style:style style:name="P3" style:family="paragraph" style:parent-style-name="Standard">
      <style:text-properties officeooo:rsid="002b0b32" officeooo:paragraph-rsid="002b0b32"/>
    </style:style>
    <style:style style:name="P4" style:family="paragraph" style:parent-style-name="Standard">
      <style:text-properties officeooo:paragraph-rsid="002c208f"/>
    </style:style>
    <style:style style:name="P5" style:family="paragraph" style:parent-style-name="Standard">
      <style:text-properties officeooo:rsid="0040ca05" officeooo:paragraph-rsid="0040ca05"/>
    </style:style>
    <style:style style:name="P6" style:family="paragraph" style:parent-style-name="Standard">
      <style:text-properties officeooo:rsid="0040ca05" officeooo:paragraph-rsid="007fbfbb"/>
    </style:style>
    <style:style style:name="P7" style:family="paragraph" style:parent-style-name="Standard">
      <style:text-properties officeooo:rsid="00438421" officeooo:paragraph-rsid="00438421"/>
    </style:style>
    <style:style style:name="P8" style:family="paragraph" style:parent-style-name="Standard">
      <style:text-properties officeooo:rsid="00438421" officeooo:paragraph-rsid="0067c4d5"/>
    </style:style>
    <style:style style:name="P9" style:family="paragraph" style:parent-style-name="Standard">
      <style:text-properties officeooo:paragraph-rsid="00438421"/>
    </style:style>
    <style:style style:name="P10" style:family="paragraph" style:parent-style-name="Standard">
      <style:text-properties officeooo:rsid="00440e25" officeooo:paragraph-rsid="00440e25"/>
    </style:style>
    <style:style style:name="P11" style:family="paragraph" style:parent-style-name="Standard">
      <style:text-properties officeooo:paragraph-rsid="0045dd7d"/>
    </style:style>
    <style:style style:name="P12" style:family="paragraph" style:parent-style-name="Standard">
      <style:text-properties officeooo:rsid="00245da1" officeooo:paragraph-rsid="00243f8b"/>
    </style:style>
    <style:style style:name="P13" style:family="paragraph" style:parent-style-name="Standard">
      <style:text-properties officeooo:rsid="00493526" officeooo:paragraph-rsid="00493526"/>
    </style:style>
    <style:style style:name="P14" style:family="paragraph" style:parent-style-name="Standard">
      <style:text-properties officeooo:paragraph-rsid="002e09bf"/>
    </style:style>
    <style:style style:name="P15" style:family="paragraph" style:parent-style-name="Standard">
      <style:text-properties officeooo:rsid="00534115" officeooo:paragraph-rsid="00534115"/>
    </style:style>
    <style:style style:name="P16" style:family="paragraph" style:parent-style-name="Standard">
      <style:text-properties fo:font-style="normal" officeooo:rsid="003a17f4" officeooo:paragraph-rsid="0045dd7d" style:font-style-asian="normal" style:font-style-complex="normal"/>
    </style:style>
    <style:style style:name="P17" style:family="paragraph" style:parent-style-name="Standard">
      <style:text-properties officeooo:rsid="0056fcd5" officeooo:paragraph-rsid="0056fcd5"/>
    </style:style>
    <style:style style:name="P18" style:family="paragraph" style:parent-style-name="Standard">
      <style:text-properties officeooo:rsid="0056fcd5" officeooo:paragraph-rsid="0054cbe7"/>
    </style:style>
    <style:style style:name="P19" style:family="paragraph" style:parent-style-name="Standard">
      <style:text-properties officeooo:paragraph-rsid="006a9a95"/>
    </style:style>
    <style:style style:name="P20" style:family="paragraph" style:parent-style-name="Standard">
      <style:text-properties officeooo:paragraph-rsid="00280c05"/>
    </style:style>
    <style:style style:name="P21" style:family="paragraph" style:parent-style-name="Standard">
      <style:text-properties officeooo:rsid="00793a24" officeooo:paragraph-rsid="00793a24"/>
    </style:style>
    <style:style style:name="P22" style:family="paragraph" style:parent-style-name="Standard">
      <style:text-properties officeooo:rsid="00793a24" officeooo:paragraph-rsid="00cb7783"/>
    </style:style>
    <style:style style:name="P23" style:family="paragraph" style:parent-style-name="Standard">
      <style:text-properties officeooo:paragraph-rsid="0078a359"/>
    </style:style>
    <style:style style:name="P24" style:family="paragraph" style:parent-style-name="Standard">
      <style:text-properties officeooo:paragraph-rsid="0085a476"/>
    </style:style>
    <style:style style:name="P25" style:family="paragraph" style:parent-style-name="Standard">
      <style:text-properties officeooo:rsid="00799988" officeooo:paragraph-rsid="00799988"/>
    </style:style>
    <style:style style:name="P26" style:family="paragraph" style:parent-style-name="Standard">
      <style:text-properties officeooo:rsid="00877358" officeooo:paragraph-rsid="00877358"/>
    </style:style>
    <style:style style:name="P27" style:family="paragraph" style:parent-style-name="Standard">
      <style:paragraph-properties fo:text-align="start" style:justify-single-word="false"/>
      <style:text-properties officeooo:rsid="008884d6" officeooo:paragraph-rsid="008884d6"/>
    </style:style>
    <style:style style:name="P28" style:family="paragraph" style:parent-style-name="Standard">
      <style:text-properties officeooo:rsid="008d749e" officeooo:paragraph-rsid="008d749e"/>
    </style:style>
    <style:style style:name="P29" style:family="paragraph" style:parent-style-name="Standard">
      <style:text-properties officeooo:rsid="0092658f" officeooo:paragraph-rsid="0092658f"/>
    </style:style>
    <style:style style:name="P30" style:family="paragraph" style:parent-style-name="Standard">
      <style:text-properties officeooo:rsid="0093f07f" officeooo:paragraph-rsid="0093f07f"/>
    </style:style>
    <style:style style:name="P31" style:family="paragraph" style:parent-style-name="Standard">
      <style:paragraph-properties fo:text-align="start" style:justify-single-word="false"/>
      <style:text-properties fo:font-weight="normal" officeooo:rsid="007c8915" officeooo:paragraph-rsid="00a823dc" style:font-weight-asian="normal" style:font-weight-complex="normal"/>
    </style:style>
    <style:style style:name="P32" style:family="paragraph" style:parent-style-name="Standard">
      <style:text-properties fo:font-weight="bold" officeooo:rsid="00bb2790" officeooo:paragraph-rsid="00793a24" style:font-weight-asian="bold" style:font-weight-complex="bold"/>
    </style:style>
    <style:style style:name="P33" style:family="paragraph" style:parent-style-name="Standard">
      <style:paragraph-properties fo:text-align="center" style:justify-single-word="false"/>
      <style:text-properties fo:font-weight="bold" officeooo:rsid="00dfc034" officeooo:paragraph-rsid="00dfc034" style:font-weight-asian="bold" style:font-weight-complex="bold"/>
    </style:style>
    <style:style style:name="P34" style:family="paragraph" style:parent-style-name="Standard">
      <style:text-properties officeooo:paragraph-rsid="00a8e85c"/>
    </style:style>
    <style:style style:name="P35" style:family="paragraph" style:parent-style-name="Standard">
      <style:text-properties officeooo:paragraph-rsid="000f373b"/>
    </style:style>
    <style:style style:name="P36" style:family="paragraph" style:parent-style-name="Standard">
      <style:text-properties officeooo:paragraph-rsid="00a000e2"/>
    </style:style>
    <style:style style:name="P37" style:family="paragraph" style:parent-style-name="Standard">
      <style:text-properties officeooo:paragraph-rsid="00b1d034"/>
    </style:style>
    <style:style style:name="P38" style:family="paragraph" style:parent-style-name="Standard">
      <style:text-properties officeooo:rsid="0083b263" officeooo:paragraph-rsid="0045dd7d"/>
    </style:style>
    <style:style style:name="P39" style:family="paragraph" style:parent-style-name="Standard">
      <style:text-properties officeooo:paragraph-rsid="00877358"/>
    </style:style>
    <style:style style:name="P40" style:family="paragraph" style:parent-style-name="Standard">
      <style:text-properties officeooo:paragraph-rsid="00440e25"/>
    </style:style>
    <style:style style:name="P41" style:family="paragraph" style:parent-style-name="Standard">
      <style:text-properties officeooo:paragraph-rsid="00799988"/>
    </style:style>
    <style:style style:name="P42" style:family="paragraph" style:parent-style-name="Standard">
      <style:text-properties officeooo:paragraph-rsid="00c52afb"/>
    </style:style>
    <style:style style:name="P43" style:family="paragraph" style:parent-style-name="Standard">
      <style:text-properties officeooo:paragraph-rsid="00793a24"/>
    </style:style>
    <style:style style:name="P44" style:family="paragraph" style:parent-style-name="Standard">
      <style:paragraph-properties fo:text-align="center" style:justify-single-word="false"/>
      <style:text-properties officeooo:paragraph-rsid="0045dd7d"/>
    </style:style>
    <style:style style:name="P45" style:family="paragraph" style:parent-style-name="Standard">
      <style:paragraph-properties fo:text-align="start" style:justify-single-word="false"/>
      <style:text-properties officeooo:paragraph-rsid="00e40697"/>
    </style:style>
    <style:style style:name="P46" style:family="paragraph" style:parent-style-name="Standard">
      <style:text-properties officeooo:paragraph-rsid="00d16d47"/>
    </style:style>
    <style:style style:name="P47" style:family="paragraph" style:parent-style-name="Standard">
      <style:text-properties officeooo:paragraph-rsid="00d36925"/>
    </style:style>
    <style:style style:name="P48" style:family="paragraph" style:parent-style-name="Standard">
      <style:text-properties officeooo:rsid="00d6e8c9" officeooo:paragraph-rsid="00d79b01"/>
    </style:style>
    <style:style style:name="P49" style:family="paragraph" style:parent-style-name="Standard">
      <style:text-properties officeooo:rsid="00293357" officeooo:paragraph-rsid="00b1d034"/>
    </style:style>
    <style:style style:name="P50" style:family="paragraph" style:parent-style-name="Standard">
      <style:text-properties officeooo:rsid="00293357" officeooo:paragraph-rsid="002bd837"/>
    </style:style>
    <style:style style:name="P51" style:family="paragraph" style:parent-style-name="Standard">
      <style:text-properties officeooo:rsid="002c208f" officeooo:paragraph-rsid="002bd837"/>
    </style:style>
    <style:style style:name="P52" style:family="paragraph" style:parent-style-name="Standard">
      <style:text-properties officeooo:rsid="002c208f" officeooo:paragraph-rsid="00deb6d2"/>
    </style:style>
    <style:style style:name="P53" style:family="paragraph" style:parent-style-name="Standard">
      <style:text-properties officeooo:rsid="002667c8" officeooo:paragraph-rsid="001aa529"/>
    </style:style>
    <style:style style:name="P54" style:family="paragraph" style:parent-style-name="Standard">
      <style:text-properties officeooo:rsid="00daf83e" officeooo:paragraph-rsid="00daf83e"/>
    </style:style>
    <style:style style:name="P55" style:family="paragraph" style:parent-style-name="Standard">
      <style:text-properties officeooo:paragraph-rsid="00dcbb30"/>
    </style:style>
    <style:style style:name="P56" style:family="paragraph" style:parent-style-name="Standard">
      <style:text-properties officeooo:rsid="009f20b5" officeooo:paragraph-rsid="00bb1d34"/>
    </style:style>
    <style:style style:name="P57" style:family="paragraph" style:parent-style-name="Standard">
      <style:text-properties officeooo:rsid="00e1fe3a" officeooo:paragraph-rsid="00e40697"/>
    </style:style>
    <style:style style:name="P58" style:family="paragraph" style:parent-style-name="Standard">
      <style:text-properties officeooo:paragraph-rsid="007fbfbb"/>
    </style:style>
    <style:style style:name="P59" style:family="paragraph" style:parent-style-name="Standard">
      <style:text-properties officeooo:paragraph-rsid="00e24424"/>
    </style:style>
    <style:style style:name="P60" style:family="paragraph" style:parent-style-name="Standard">
      <style:text-properties officeooo:paragraph-rsid="00e40697"/>
    </style:style>
    <style:style style:name="P61" style:family="paragraph" style:parent-style-name="Standard">
      <style:text-properties officeooo:rsid="0031519f" officeooo:paragraph-rsid="00e40697"/>
    </style:style>
    <style:style style:name="P62" style:family="paragraph" style:parent-style-name="Standard">
      <style:paragraph-properties fo:break-before="page"/>
      <style:text-properties officeooo:rsid="002b0b32" officeooo:paragraph-rsid="00479381"/>
    </style:style>
    <style:style style:name="P63" style:family="paragraph" style:parent-style-name="Standard">
      <style:paragraph-properties fo:text-align="start" style:justify-single-word="false" fo:break-before="page"/>
      <style:text-properties officeooo:rsid="0054cbe7" officeooo:paragraph-rsid="0054cbe7"/>
    </style:style>
    <style:style style:name="P64" style:family="paragraph" style:parent-style-name="Standard">
      <style:paragraph-properties fo:text-align="center" style:justify-single-word="false" fo:break-before="page"/>
      <style:text-properties officeooo:paragraph-rsid="00a823dc"/>
    </style:style>
    <style:style style:name="P65" style:family="paragraph" style:parent-style-name="Standard">
      <style:paragraph-properties fo:text-align="start" style:justify-single-word="false"/>
      <style:text-properties fo:font-weight="bold" officeooo:rsid="00d7feda" officeooo:paragraph-rsid="00d7feda" style:font-weight-asian="bold" style:font-weight-complex="bold"/>
    </style:style>
    <style:style style:name="P66" style:family="paragraph" style:parent-style-name="Standard">
      <style:paragraph-properties fo:text-align="center" style:justify-single-word="false"/>
      <style:text-properties fo:font-weight="bold" officeooo:rsid="00cc1953" officeooo:paragraph-rsid="00a823dc" style:font-weight-asian="bold" style:font-weight-complex="bold"/>
    </style:style>
    <style:style style:name="P67" style:family="paragraph" style:parent-style-name="Standard" style:list-style-name="L1">
      <style:text-properties officeooo:paragraph-rsid="00d4f2c8"/>
    </style:style>
    <style:style style:name="P68" style:family="paragraph" style:parent-style-name="Standard" style:list-style-name="L1">
      <style:text-properties officeooo:rsid="00d4f2c8" officeooo:paragraph-rsid="00d4f2c8"/>
    </style:style>
    <style:style style:name="P69" style:family="paragraph" style:parent-style-name="Standard">
      <style:text-properties officeooo:rsid="00daf83e" officeooo:paragraph-rsid="00daf83e"/>
    </style:style>
    <style:style style:name="P70" style:family="paragraph" style:parent-style-name="Standard" style:list-style-name="L2">
      <style:text-properties officeooo:paragraph-rsid="00440e25"/>
    </style:style>
    <style:style style:name="P71" style:family="paragraph" style:parent-style-name="Standard" style:list-style-name="L2">
      <style:text-properties officeooo:paragraph-rsid="006a9a95"/>
    </style:style>
    <style:style style:name="P72" style:family="paragraph" style:parent-style-name="Standard" style:list-style-name="L2">
      <style:text-properties officeooo:paragraph-rsid="0045dd7d"/>
    </style:style>
    <style:style style:name="P73" style:family="paragraph" style:parent-style-name="Standard" style:list-style-name="L2">
      <style:text-properties officeooo:rsid="0045dd7d" officeooo:paragraph-rsid="0045dd7d"/>
    </style:style>
    <style:style style:name="P74" style:family="paragraph" style:parent-style-name="Standard">
      <style:paragraph-properties fo:text-align="center" style:justify-single-word="false"/>
      <style:text-properties officeooo:paragraph-rsid="0054cbe7"/>
    </style:style>
    <style:style style:name="P75" style:family="paragraph" style:parent-style-name="Standard">
      <style:paragraph-properties fo:text-align="center" style:justify-single-word="false" fo:break-before="page"/>
      <style:text-properties officeooo:paragraph-rsid="0045dd7d"/>
    </style:style>
    <style:style style:name="P76" style:family="paragraph" style:parent-style-name="Standard">
      <style:paragraph-properties fo:text-align="center" style:justify-single-word="false" fo:break-before="page"/>
      <style:text-properties officeooo:paragraph-rsid="008884d6"/>
    </style:style>
    <style:style style:name="P77" style:family="paragraph" style:parent-style-name="Standard">
      <style:paragraph-properties fo:text-align="center" style:justify-single-word="false" fo:break-before="page"/>
      <style:text-properties officeooo:paragraph-rsid="00793a24"/>
    </style:style>
    <style:style style:name="T1" style:family="text">
      <style:text-properties officeooo:rsid="00111cb1"/>
    </style:style>
    <style:style style:name="T2" style:family="text">
      <style:text-properties officeooo:rsid="00124f3d"/>
    </style:style>
    <style:style style:name="T3" style:family="text">
      <style:text-properties officeooo:rsid="00133490"/>
    </style:style>
    <style:style style:name="T4" style:family="text">
      <style:text-properties fo:font-weight="bold" style:font-weight-asian="bold" style:font-weight-complex="bold"/>
    </style:style>
    <style:style style:name="T5" style:family="text">
      <style:text-properties fo:font-weight="bold" officeooo:rsid="0092658f" style:font-weight-asian="bold" style:font-weight-complex="bold"/>
    </style:style>
    <style:style style:name="T6" style:family="text">
      <style:text-properties fo:font-weight="bold" officeooo:rsid="00243f8b" style:font-weight-asian="bold" style:font-weight-complex="bold"/>
    </style:style>
    <style:style style:name="T7" style:family="text">
      <style:text-properties fo:font-weight="bold" officeooo:rsid="001ffd05" style:font-weight-asian="bold" style:font-weight-complex="bold"/>
    </style:style>
    <style:style style:name="T8" style:family="text">
      <style:text-properties fo:font-weight="bold" officeooo:rsid="00bb1d34" style:font-weight-asian="bold" style:font-weight-complex="bold"/>
    </style:style>
    <style:style style:name="T9" style:family="text">
      <style:text-properties fo:font-weight="bold" officeooo:rsid="00cc1953" style:font-weight-asian="bold" style:font-weight-complex="bold"/>
    </style:style>
    <style:style style:name="T10" style:family="text">
      <style:text-properties fo:font-weight="bold" officeooo:rsid="007c8915" style:font-weight-asian="bold" style:font-weight-complex="bold"/>
    </style:style>
    <style:style style:name="T11" style:family="text">
      <style:text-properties fo:font-weight="bold" officeooo:rsid="0045dd7d" style:font-weight-asian="bold" style:font-weight-complex="bold"/>
    </style:style>
    <style:style style:name="T12" style:family="text">
      <style:text-properties fo:font-weight="bold" officeooo:rsid="00e41955" style:font-weight-asian="bold" style:font-weight-complex="bold"/>
    </style:style>
    <style:style style:name="T13" style:family="text">
      <style:text-properties fo:font-weight="bold" officeooo:rsid="00c7b6b6" style:font-weight-asian="bold" style:font-weight-complex="bold"/>
    </style:style>
    <style:style style:name="T14" style:family="text">
      <style:text-properties fo:font-weight="bold" officeooo:rsid="008884d6" style:font-weight-asian="bold" style:font-weight-complex="bold"/>
    </style:style>
    <style:style style:name="T15" style:family="text">
      <style:text-properties fo:font-weight="bold" officeooo:rsid="0054cbe7" style:font-weight-asian="bold" style:font-weight-complex="bold"/>
    </style:style>
    <style:style style:name="T16" style:family="text">
      <style:text-properties fo:font-weight="bold" officeooo:rsid="00793a24" style:font-weight-asian="bold" style:font-weight-complex="bold"/>
    </style:style>
    <style:style style:name="T17" style:family="text">
      <style:text-properties officeooo:rsid="0015933b"/>
    </style:style>
    <style:style style:name="T18" style:family="text">
      <style:text-properties officeooo:rsid="0016bd42"/>
    </style:style>
    <style:style style:name="T19" style:family="text">
      <style:text-properties officeooo:rsid="001721d7"/>
    </style:style>
    <style:style style:name="T20" style:family="text">
      <style:text-properties officeooo:rsid="0018c8d0"/>
    </style:style>
    <style:style style:name="T21" style:family="text">
      <style:text-properties officeooo:rsid="001aa529"/>
    </style:style>
    <style:style style:name="T22" style:family="text">
      <style:text-properties officeooo:rsid="001c59bf"/>
    </style:style>
    <style:style style:name="T23" style:family="text">
      <style:text-properties officeooo:rsid="001c8f97"/>
    </style:style>
    <style:style style:name="T24" style:family="text">
      <style:text-properties officeooo:rsid="001d9d77"/>
    </style:style>
    <style:style style:name="T25" style:family="text">
      <style:text-properties officeooo:rsid="001e2ade"/>
    </style:style>
    <style:style style:name="T26" style:family="text">
      <style:text-properties officeooo:rsid="001ffd05"/>
    </style:style>
    <style:style style:name="T27" style:family="text">
      <style:text-properties officeooo:rsid="0022d625"/>
    </style:style>
    <style:style style:name="T28" style:family="text">
      <style:text-properties officeooo:rsid="00243f8b"/>
    </style:style>
    <style:style style:name="T29" style:family="text">
      <style:text-properties officeooo:rsid="00245da1"/>
    </style:style>
    <style:style style:name="T30" style:family="text">
      <style:text-properties fo:font-style="normal" officeooo:rsid="00245da1" style:font-style-asian="normal" style:font-style-complex="normal"/>
    </style:style>
    <style:style style:name="T31" style:family="text">
      <style:text-properties fo:font-style="normal" officeooo:rsid="008e42f3" style:font-style-asian="normal" style:font-style-complex="normal"/>
    </style:style>
    <style:style style:name="T32" style:family="text">
      <style:text-properties fo:font-style="normal" officeooo:rsid="009bfeeb" style:font-style-asian="normal" style:font-style-complex="normal"/>
    </style:style>
    <style:style style:name="T33" style:family="text">
      <style:text-properties fo:font-style="normal" fo:font-weight="normal" officeooo:rsid="0022d625" style:font-style-asian="normal" style:font-weight-asian="normal" style:font-style-complex="normal" style:font-weight-complex="normal"/>
    </style:style>
    <style:style style:name="T34" style:family="text">
      <style:text-properties officeooo:rsid="0024fbe8"/>
    </style:style>
    <style:style style:name="T35" style:family="text">
      <style:text-properties fo:font-weight="normal" officeooo:rsid="00afdf0b" style:font-weight-asian="normal" style:font-weight-complex="normal"/>
    </style:style>
    <style:style style:name="T36" style:family="text">
      <style:text-properties fo:font-weight="normal" officeooo:rsid="00cde279" style:font-weight-asian="normal" style:font-weight-complex="normal"/>
    </style:style>
    <style:style style:name="T37" style:family="text">
      <style:text-properties fo:font-weight="normal" officeooo:rsid="00438421" style:font-weight-asian="normal" style:font-weight-complex="normal"/>
    </style:style>
    <style:style style:name="T38" style:family="text">
      <style:text-properties fo:font-weight="normal" officeooo:rsid="001721d7" style:font-weight-asian="normal" style:font-weight-complex="normal"/>
    </style:style>
    <style:style style:name="T39" style:family="text">
      <style:text-properties officeooo:rsid="002667c8"/>
    </style:style>
    <style:style style:name="T40" style:family="text">
      <style:text-properties officeooo:rsid="00269b62"/>
    </style:style>
    <style:style style:name="T41" style:family="text">
      <style:text-properties officeooo:rsid="000f373b"/>
    </style:style>
    <style:style style:name="T42" style:family="text">
      <style:text-properties officeooo:rsid="00279888"/>
    </style:style>
    <style:style style:name="T43" style:family="text">
      <style:text-properties officeooo:rsid="00280c05"/>
    </style:style>
    <style:style style:name="T44" style:family="text">
      <style:text-properties officeooo:rsid="00293357"/>
    </style:style>
    <style:style style:name="T45" style:family="text">
      <style:text-properties officeooo:rsid="002b0b32"/>
    </style:style>
    <style:style style:name="T46" style:family="text">
      <style:text-properties officeooo:rsid="002bd837"/>
    </style:style>
    <style:style style:name="T47" style:family="text">
      <style:text-properties officeooo:rsid="002c208f"/>
    </style:style>
    <style:style style:name="T48" style:family="text">
      <style:text-properties officeooo:rsid="002cedfa"/>
    </style:style>
    <style:style style:name="T49" style:family="text">
      <style:text-properties officeooo:rsid="0031519f"/>
    </style:style>
    <style:style style:name="T50" style:family="text">
      <style:text-properties officeooo:rsid="0032d06c"/>
    </style:style>
    <style:style style:name="T51" style:family="text">
      <style:text-properties officeooo:rsid="00338f1a"/>
    </style:style>
    <style:style style:name="T52" style:family="text">
      <style:text-properties officeooo:rsid="0034e6a1"/>
    </style:style>
    <style:style style:name="T53" style:family="text">
      <style:text-properties officeooo:rsid="0035605f"/>
    </style:style>
    <style:style style:name="T54" style:family="text">
      <style:text-properties officeooo:rsid="003614bd"/>
    </style:style>
    <style:style style:name="T55" style:family="text">
      <style:text-properties officeooo:rsid="003752c8"/>
    </style:style>
    <style:style style:name="T56" style:family="text">
      <style:text-properties officeooo:rsid="003a17f4"/>
    </style:style>
    <style:style style:name="T57" style:family="text">
      <style:text-properties officeooo:rsid="003bc403"/>
    </style:style>
    <style:style style:name="T58" style:family="text">
      <style:text-properties officeooo:rsid="003f307f"/>
    </style:style>
    <style:style style:name="T59" style:family="text">
      <style:text-properties officeooo:rsid="0040ca05"/>
    </style:style>
    <style:style style:name="T60" style:family="text">
      <style:text-properties officeooo:rsid="00438421"/>
    </style:style>
    <style:style style:name="T61" style:family="text">
      <style:text-properties officeooo:rsid="00440e25"/>
    </style:style>
    <style:style style:name="T62" style:family="text">
      <style:text-properties officeooo:rsid="0045dd7d"/>
    </style:style>
    <style:style style:name="T63" style:family="text">
      <style:text-properties officeooo:rsid="00479381"/>
    </style:style>
    <style:style style:name="T64" style:family="text">
      <style:text-properties officeooo:rsid="004f0b7a"/>
    </style:style>
    <style:style style:name="T65" style:family="text">
      <style:text-properties officeooo:rsid="004ff3d7"/>
    </style:style>
    <style:style style:name="T66" style:family="text">
      <style:text-properties officeooo:rsid="0050d7ff"/>
    </style:style>
    <style:style style:name="T67" style:family="text">
      <style:text-properties officeooo:rsid="0050ef5e"/>
    </style:style>
    <style:style style:name="T68" style:family="text">
      <style:text-properties officeooo:rsid="005ed7c1"/>
    </style:style>
    <style:style style:name="T69" style:family="text">
      <style:text-properties officeooo:rsid="00602a22"/>
    </style:style>
    <style:style style:name="T70" style:family="text">
      <style:text-properties officeooo:rsid="006127d8"/>
    </style:style>
    <style:style style:name="T71" style:family="text">
      <style:text-properties officeooo:rsid="00625f63"/>
    </style:style>
    <style:style style:name="T72" style:family="text">
      <style:text-properties officeooo:rsid="00632343"/>
    </style:style>
    <style:style style:name="T73" style:family="text">
      <style:text-properties officeooo:rsid="006376bd"/>
    </style:style>
    <style:style style:name="T74" style:family="text">
      <style:text-properties officeooo:rsid="00649b69"/>
    </style:style>
    <style:style style:name="T75" style:family="text">
      <style:text-properties officeooo:rsid="0064d033"/>
    </style:style>
    <style:style style:name="T76" style:family="text">
      <style:text-properties officeooo:rsid="00661015"/>
    </style:style>
    <style:style style:name="T77" style:family="text">
      <style:text-properties officeooo:rsid="0066701e"/>
    </style:style>
    <style:style style:name="T78" style:family="text">
      <style:text-properties officeooo:rsid="0067c4d5"/>
    </style:style>
    <style:style style:name="T79" style:family="text">
      <style:text-properties officeooo:rsid="00696b54"/>
    </style:style>
    <style:style style:name="T80" style:family="text">
      <style:text-properties fo:font-style="italic" officeooo:rsid="00438421" style:font-style-asian="italic" style:font-style-complex="italic"/>
    </style:style>
    <style:style style:name="T81" style:family="text">
      <style:text-properties fo:font-style="italic" officeooo:rsid="0067c4d5" style:font-style-asian="italic" style:font-style-complex="italic"/>
    </style:style>
    <style:style style:name="T82" style:family="text">
      <style:text-properties officeooo:rsid="006a9a95"/>
    </style:style>
    <style:style style:name="T83" style:family="text">
      <style:text-properties officeooo:rsid="00534115"/>
    </style:style>
    <style:style style:name="T84" style:family="text">
      <style:text-properties officeooo:rsid="006b85c0"/>
    </style:style>
    <style:style style:name="T85" style:family="text">
      <style:text-properties officeooo:rsid="006d1641"/>
    </style:style>
    <style:style style:name="T86" style:family="text">
      <style:text-properties officeooo:rsid="006ec0e6"/>
    </style:style>
    <style:style style:name="T87" style:family="text">
      <style:text-properties officeooo:rsid="006fb577"/>
    </style:style>
    <style:style style:name="T88" style:family="text">
      <style:text-properties officeooo:rsid="0070bded"/>
    </style:style>
    <style:style style:name="T89" style:family="text">
      <style:text-properties officeooo:rsid="007497d3"/>
    </style:style>
    <style:style style:name="T90" style:family="text">
      <style:text-properties officeooo:rsid="0075e5fe"/>
    </style:style>
    <style:style style:name="T91" style:family="text">
      <style:text-properties officeooo:rsid="00772df8"/>
    </style:style>
    <style:style style:name="T92" style:family="text">
      <style:text-properties officeooo:rsid="0078a359"/>
    </style:style>
    <style:style style:name="T93" style:family="text">
      <style:text-properties officeooo:rsid="00799988"/>
    </style:style>
    <style:style style:name="T94" style:family="text">
      <style:text-properties officeooo:rsid="007d0c05"/>
    </style:style>
    <style:style style:name="T95" style:family="text">
      <style:text-properties officeooo:rsid="007de9ea"/>
    </style:style>
    <style:style style:name="T96" style:family="text">
      <style:text-properties officeooo:rsid="007fbfbb"/>
    </style:style>
    <style:style style:name="T97" style:family="text">
      <style:text-properties officeooo:rsid="00817fce"/>
    </style:style>
    <style:style style:name="T98" style:family="text">
      <style:text-properties officeooo:rsid="0083640a"/>
    </style:style>
    <style:style style:name="T99" style:family="text">
      <style:text-properties officeooo:rsid="00837ea3"/>
    </style:style>
    <style:style style:name="T100" style:family="text">
      <style:text-properties officeooo:rsid="0083b263"/>
    </style:style>
    <style:style style:name="T101" style:family="text">
      <style:text-properties officeooo:rsid="0085a476"/>
    </style:style>
    <style:style style:name="T102" style:family="text">
      <style:text-properties officeooo:rsid="0056fcd5"/>
    </style:style>
    <style:style style:name="T103" style:family="text">
      <style:text-properties officeooo:rsid="00877358"/>
    </style:style>
    <style:style style:name="T104" style:family="text">
      <style:text-properties officeooo:rsid="00881853"/>
    </style:style>
    <style:style style:name="T105" style:family="text">
      <style:text-properties officeooo:rsid="008884d6"/>
    </style:style>
    <style:style style:name="T106" style:family="text">
      <style:text-properties officeooo:rsid="008d749e"/>
    </style:style>
    <style:style style:name="T107" style:family="text">
      <style:text-properties officeooo:rsid="008e42f3"/>
    </style:style>
    <style:style style:name="T108" style:family="text">
      <style:text-properties officeooo:rsid="0091e004"/>
    </style:style>
    <style:style style:name="T109" style:family="text">
      <style:text-properties officeooo:rsid="0092658f"/>
    </style:style>
    <style:style style:name="T110" style:family="text">
      <style:text-properties officeooo:rsid="00928c42"/>
    </style:style>
    <style:style style:name="T111" style:family="text">
      <style:text-properties officeooo:rsid="0092d1ad"/>
    </style:style>
    <style:style style:name="T112" style:family="text">
      <style:text-properties officeooo:rsid="0093f07f"/>
    </style:style>
    <style:style style:name="T113" style:family="text">
      <style:text-properties officeooo:rsid="00941847"/>
    </style:style>
    <style:style style:name="T114" style:family="text">
      <style:text-properties officeooo:rsid="00955ae9"/>
    </style:style>
    <style:style style:name="T115" style:family="text">
      <style:text-properties officeooo:rsid="009686cc"/>
    </style:style>
    <style:style style:name="T116" style:family="text">
      <style:text-properties officeooo:rsid="00980556"/>
    </style:style>
    <style:style style:name="T117" style:family="text">
      <style:text-properties officeooo:rsid="009bfeeb"/>
    </style:style>
    <style:style style:name="T118" style:family="text">
      <style:text-properties officeooo:rsid="009cf42f"/>
    </style:style>
    <style:style style:name="T119" style:family="text">
      <style:text-properties officeooo:rsid="009ed59f"/>
    </style:style>
    <style:style style:name="T120" style:family="text">
      <style:text-properties officeooo:rsid="00a000e2"/>
    </style:style>
    <style:style style:name="T121" style:family="text">
      <style:text-properties officeooo:rsid="00a18ba7"/>
    </style:style>
    <style:style style:name="T122" style:family="text">
      <style:text-properties officeooo:rsid="00a51aaa"/>
    </style:style>
    <style:style style:name="T123" style:family="text">
      <style:text-properties officeooo:rsid="00a7be5b"/>
    </style:style>
    <style:style style:name="T124" style:family="text">
      <style:text-properties officeooo:rsid="00a823dc"/>
    </style:style>
    <style:style style:name="T125" style:family="text">
      <style:text-properties officeooo:rsid="00a8e85c"/>
    </style:style>
    <style:style style:name="T126" style:family="text">
      <style:text-properties officeooo:rsid="00aa933b"/>
    </style:style>
    <style:style style:name="T127" style:family="text">
      <style:text-properties officeooo:rsid="00aaf8b2"/>
    </style:style>
    <style:style style:name="T128" style:family="text">
      <style:text-properties officeooo:rsid="00ac4ad4"/>
    </style:style>
    <style:style style:name="T129" style:family="text">
      <style:text-properties officeooo:rsid="00ae14c3"/>
    </style:style>
    <style:style style:name="T130" style:family="text">
      <style:text-properties officeooo:rsid="00afdf0b"/>
    </style:style>
    <style:style style:name="T131" style:family="text">
      <style:text-properties officeooo:rsid="00b1d034"/>
    </style:style>
    <style:style style:name="T132" style:family="text">
      <style:text-properties officeooo:rsid="00b350a1"/>
    </style:style>
    <style:style style:name="T133" style:family="text">
      <style:text-properties officeooo:rsid="00b42a5a"/>
    </style:style>
    <style:style style:name="T134" style:family="text">
      <style:text-properties officeooo:rsid="00b4a420"/>
    </style:style>
    <style:style style:name="T135" style:family="text">
      <style:text-properties officeooo:rsid="00b686ac"/>
    </style:style>
    <style:style style:name="T136" style:family="text">
      <style:text-properties officeooo:rsid="00b71478"/>
    </style:style>
    <style:style style:name="T137" style:family="text">
      <style:text-properties officeooo:rsid="00b8a30d"/>
    </style:style>
    <style:style style:name="T138" style:family="text">
      <style:text-properties officeooo:rsid="00b9d6b3"/>
    </style:style>
    <style:style style:name="T139" style:family="text">
      <style:text-properties officeooo:rsid="00bb1d34"/>
    </style:style>
    <style:style style:name="T140" style:family="text">
      <style:text-properties officeooo:rsid="00bf158d"/>
    </style:style>
    <style:style style:name="T141" style:family="text">
      <style:text-properties officeooo:rsid="00c1e22a"/>
    </style:style>
    <style:style style:name="T142" style:family="text">
      <style:text-properties officeooo:rsid="00c36c20"/>
    </style:style>
    <style:style style:name="T143" style:family="text">
      <style:text-properties officeooo:rsid="00c409a4"/>
    </style:style>
    <style:style style:name="T144" style:family="text">
      <style:text-properties officeooo:rsid="00c52afb"/>
    </style:style>
    <style:style style:name="T145" style:family="text">
      <style:text-properties officeooo:rsid="00c735e5"/>
    </style:style>
    <style:style style:name="T146" style:family="text">
      <style:text-properties officeooo:rsid="00c7b6b6"/>
    </style:style>
    <style:style style:name="T147" style:family="text">
      <style:text-properties officeooo:rsid="00cb7783"/>
    </style:style>
    <style:style style:name="T148" style:family="text">
      <style:text-properties officeooo:rsid="00cc1953"/>
    </style:style>
    <style:style style:name="T149" style:family="text">
      <style:text-properties officeooo:rsid="00cde279"/>
    </style:style>
    <style:style style:name="T150" style:family="text">
      <style:text-properties officeooo:rsid="00ce4bee"/>
    </style:style>
    <style:style style:name="T151" style:family="text">
      <style:text-properties officeooo:rsid="00d00923"/>
    </style:style>
    <style:style style:name="T152" style:family="text">
      <style:text-properties officeooo:rsid="00d16d47"/>
    </style:style>
    <style:style style:name="T153" style:family="text">
      <style:text-properties officeooo:rsid="00d27880"/>
    </style:style>
    <style:style style:name="T154" style:family="text">
      <style:text-properties officeooo:rsid="00d34e0b"/>
    </style:style>
    <style:style style:name="T155" style:family="text">
      <style:text-properties officeooo:rsid="00d36925"/>
    </style:style>
    <style:style style:name="T156" style:family="text">
      <style:text-properties officeooo:rsid="00d4f2c8"/>
    </style:style>
    <style:style style:name="T157" style:family="text">
      <style:text-properties officeooo:rsid="00d6e8c9"/>
    </style:style>
    <style:style style:name="T158" style:family="text">
      <style:text-properties officeooo:rsid="00d79b01"/>
    </style:style>
    <style:style style:name="T159" style:family="text">
      <style:text-properties officeooo:rsid="00d7feda"/>
    </style:style>
    <style:style style:name="T160" style:family="text">
      <style:text-properties officeooo:rsid="00d9d1f1"/>
    </style:style>
    <style:style style:name="T161" style:family="text">
      <style:text-properties officeooo:rsid="00da35b5"/>
    </style:style>
    <style:style style:name="T162" style:family="text">
      <style:text-properties officeooo:rsid="00da9e1e"/>
    </style:style>
    <style:style style:name="T163" style:family="text">
      <style:text-properties officeooo:rsid="00daf83e"/>
    </style:style>
    <style:style style:name="T164" style:family="text">
      <style:text-properties officeooo:rsid="00dcbb30"/>
    </style:style>
    <style:style style:name="T165" style:family="text">
      <style:text-properties officeooo:rsid="00deb6d2"/>
    </style:style>
    <style:style style:name="T166" style:family="text">
      <style:text-properties officeooo:rsid="00dfc034"/>
    </style:style>
    <style:style style:name="T167" style:family="text">
      <style:text-properties officeooo:rsid="00e043a4"/>
    </style:style>
    <style:style style:name="T168" style:family="text">
      <style:text-properties officeooo:rsid="00e1fe3a"/>
    </style:style>
    <style:style style:name="T169" style:family="text">
      <style:text-properties officeooo:rsid="00e24424"/>
    </style:style>
    <style:style style:name="T170" style:family="text">
      <style:text-properties officeooo:rsid="00e28e7e"/>
    </style:style>
    <style:style style:name="T171" style:family="text">
      <style:text-properties officeooo:rsid="00e40697"/>
    </style:style>
    <style:style style:name="T172" style:family="text">
      <style:text-properties officeooo:rsid="00793a24"/>
    </style:style>
    <style:style style:name="T173" style:family="text">
      <style:text-properties officeooo:rsid="00e419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OPERATIONAL CONCEPT DESCRIPTION</text:p>
      <text:p text:style-name="P65"/>
      <text:p text:style-name="P46"><text:span text:style-name="T38">DELIVERETH</text:span><text:span text:style-name="T3"> </text:span><text:span text:style-name="T17">is</text:span><text:span text:style-name="T23"> a</text:span><text:span text:style-name="T40"> </text:span><text:span text:style-name="T63">cooperative </text:span><text:span text:style-name="T23">network</text:span><text:span text:style-name="T111"> of independent </text:span><text:span text:style-name="T124">operators</text:span><text:span text:style-name="T111"> </text:span><text:span text:style-name="T151">(our "members") </text:span><text:span text:style-name="T111">who earn</text:span><text:span text:style-name="T114"> value</text:span><text:span text:style-name="T111"> by </text:span><text:span text:style-name="T134">providing</text:span><text:span text:style-name="T111"> </text:span><text:span text:style-name="T138">a </text:span><text:span text:style-name="T152">decentralized </text:span><text:span text:style-name="T151">delivery</text:span><text:span text:style-name="T123"> </text:span><text:span text:style-name="T134">service</text:span><text:span text:style-name="T153">.</text:span></text:p>
      <text:p text:style-name="P46"/>
      <text:p text:style-name="P47"><text:span text:style-name="T111">DELIVERETH</text:span><text:span text:style-name="T70"> </text:span><text:span text:style-name="T114">is</text:span><text:span text:style-name="T123"> </text:span><text:span text:style-name="T149">a pure-virtual, </text:span><text:span text:style-name="T114">decentraliz</text:span><text:span text:style-name="T155">ed e</text:span><text:span text:style-name="T153">ntity</text:span><text:span text:style-name="T149">.</text:span><text:span text:style-name="T114"> </text:span><text:span text:style-name="T155">It has</text:span><text:span text:style-name="T112"> no </text:span><text:span text:style-name="T153">offices</text:span><text:span text:style-name="T149">, employees,</text:span><text:span text:style-name="T150"> shareholders,</text:span><text:span text:style-name="T149"> </text:span><text:span text:style-name="T112">official records</text:span><text:span text:style-name="T149">,</text:span><text:span text:style-name="T111"> </text:span><text:span text:style-name="T112">license</text:span><text:span text:style-name="T150">s,</text:span><text:span text:style-name="T112"> insurance</text:span><text:span text:style-name="T150"> nor </text:span><text:span text:style-name="T151">any tangible</text:span><text:span text:style-name="T150"> assets.</text:span><text:span text:style-name="T155"> </text:span><text:span text:style-name="T150">It is a platform</text:span><text:span text:style-name="T112"> </text:span><text:span text:style-name="T150">that</text:span><text:span text:style-name="T112"> </text:span><text:span text:style-name="T151">automatically </text:span><text:span text:style-name="T138">validates</text:span><text:span text:style-name="T134"> </text:span><text:span text:style-name="T112">members, organiz</text:span><text:span text:style-name="T125">es</text:span><text:span text:style-name="T155"> their </text:span><text:span text:style-name="T150">activities</text:span><text:span text:style-name="T159">, disciplines them</text:span><text:span text:style-name="T112"> and </text:span><text:span text:style-name="T155">pays them for work that achieves results.</text:span></text:p>
      <text:p text:style-name="P47"/>
      <text:p text:style-name="P47"><text:span text:style-name="T166">This</text:span><text:span text:style-name="T159"> platform</text:span><text:span text:style-name="T112"> i</text:span><text:span text:style-name="T150">s</text:span><text:span text:style-name="T112"> a</text:span><text:span text:style-name="T159">n</text:span><text:span text:style-name="T112"> </text:span><text:span text:style-name="T155">internet-based</text:span><text:span text:style-name="T124"> </text:span><text:span text:style-name="T112">system</text:span><text:span text:style-name="T150"> </text:span><text:span text:style-name="T112">that anyone can</text:span><text:span text:style-name="T141"> use</text:span><text:span text:style-name="T112">.</text:span><text:span text:style-name="T150"> </text:span><text:span text:style-name="T166">It</text:span><text:span text:style-name="T127"> includes</text:span><text:span text:style-name="T141"> </text:span><text:span text:style-name="T153">a set of </text:span><text:span text:style-name="T152">free/open-source </text:span><text:span text:style-name="T141">smartphone</text:span><text:span text:style-name="T152"> apps</text:span><text:span text:style-name="T153"> and</text:span><text:span text:style-name="T152"> logic expressed as</text:span><text:span text:style-name="T151"> smart contracts on a public blockchain.</text:span><text:span text:style-name="T153"> These smart contract</text:span><text:span text:style-name="T155">s</text:span><text:span text:style-name="T153"> can</text:span><text:span text:style-name="T154"> neither</text:span><text:span text:style-name="T153"> be </text:span><text:span text:style-name="T154">altered nor </text:span><text:span text:style-name="T153">stopped.</text:span></text:p>
      <text:p text:style-name="P30"/>
      <text:p text:style-name="Standard">Decentralization is <text:span text:style-name="T166">the</text:span> "North Star" but is difficult to achieve 100% in practice<text:span text:style-name="T155">. </text:span><text:span text:style-name="T156">The smart contracts support an </text:span><text:span text:style-name="T166">Owner/</text:span><text:span text:style-name="T156">Admin role that is able to force resolution of disputes in certain situations. Th</text:span><text:span text:style-name="T166">is</text:span><text:span text:style-name="T156"> role is assignable and could be held by:</text:span></text:p>
      <text:p text:style-name="Standard"/>
      <text:list xml:id="list4080872266" text:style-name="L1">
        <text:list-item>
          <text:p text:style-name="P67"><text:span text:style-name="T157">an</text:span><text:span text:style-name="T156"> externally-owned account (EOA),</text:span></text:p>
        </text:list-item>
        <text:list-item>
          <text:p text:style-name="P68">another smart contract, a voting machine perhaps,</text:p>
        </text:list-item>
        <text:list-item>
          <text:p text:style-name="P68">an account that requires multiple signatures from other accounts to operate (a "multisig"), or</text:p>
        </text:list-item>
        <text:list-item>
          <text:p text:style-name="P68">one or more AI agents operating any of the above.</text:p>
        </text:list-item>
      </text:list>
      <text:p text:style-name="P30"/>
      <text:p text:style-name="P48"><text:span text:style-name="T143">DELIVERETH </text:span><text:span text:style-name="T158">pays</text:span><text:span text:style-name="T126"> a</text:span><text:span text:style-name="T158"> </text:span><text:span text:style-name="T88">fe</text:span><text:span text:style-name="T158">e to the Admin role for doing the resolution work and being on hand to support</text:span><text:span text:style-name="T159"> and promote</text:span><text:span text:style-name="T158"> the system in whatever manner is required</text:span><text:span text:style-name="T88">.</text:span><text:span text:style-name="T158"> </text:span>The author will divest the Admin role in favour of a Decentralized Autonomous Organization (DAO).</text:p>
      <text:p text:style-name="P30"/>
      <text:p text:style-name="P30"/>
      <text:p text:style-name="P66"/>
      <text:p text:style-name="P64"><text:span text:style-name="T9">OUR</text:span><text:span text:style-name="T5"> </text:span><text:span text:style-name="T10">MEMBER</text:span></text:p>
      <text:p text:style-name="P31"/>
      <text:p text:style-name="P34"><text:span text:style-name="T53">E</text:span><text:span text:style-name="T3">very member </text:span><text:span text:style-name="T125">of DELIVERETH </text:span><text:span text:style-name="T116">i</text:span><text:span text:style-name="T85">s an</text:span><text:span text:style-name="T53"> </text:span><text:span text:style-name="T17">independent</text:span><text:span text:style-name="T116"> </text:span><text:span text:style-name="T135">owner-</text:span><text:span text:style-name="T116">operator</text:span><text:span text:style-name="T85"> </text:span><text:span text:style-name="T23">responsible for</text:span><text:span text:style-name="T71"> </text:span><text:span text:style-name="T148">their </text:span><text:span text:style-name="T23">own </text:span><text:span text:style-name="T135">licenses, </text:span><text:span text:style-name="T52">expenses</text:span><text:span text:style-name="T68">, insurance and</text:span><text:span text:style-name="T85"> </text:span><text:span text:style-name="T34">taxes</text:span><text:span text:style-name="T55">.</text:span><text:span text:style-name="T125"> </text:span><text:span text:style-name="T151">A m</text:span><text:span text:style-name="T3">ember</text:span><text:span text:style-name="T52"> </text:span><text:span text:style-name="T107">may </text:span><text:span text:style-name="T20">join</text:span><text:span text:style-name="T27"> </text:span><text:span text:style-name="T107">or</text:span><text:span text:style-name="T20"> leave</text:span><text:span text:style-name="T19"> </text:span><text:span text:style-name="T88">at</text:span><text:span text:style-name="T71"> </text:span><text:span text:style-name="T19">any time</text:span><text:span text:style-name="T41">. </text:span><text:span text:style-name="T151">Each member</text:span><text:span text:style-name="T41"> choose</text:span><text:span text:style-name="T151">s</text:span><text:span text:style-name="T19"> </text:span><text:span text:style-name="T24">their </text:span><text:span text:style-name="T17">own schedule</text:span><text:span text:style-name="T22"> and</text:span><text:span text:style-name="T107"> </text:span><text:span text:style-name="T23">location</text:span><text:span text:style-name="T22">.</text:span><text:span text:style-name="T41"> </text:span><text:span text:style-name="T56">Most</text:span><text:span text:style-name="T26"> </text:span><text:span text:style-name="T42">members</text:span><text:span text:style-name="T44"> </text:span><text:span text:style-name="T151">will be</text:span><text:span text:style-name="T44"> </text:span><text:span text:style-name="T26">mobile</text:span><text:span text:style-name="T135"> </text:span><text:span text:style-name="T151">and</text:span><text:span text:style-name="T26"> </text:span><text:span text:style-name="T56">some</text:span><text:span text:style-name="T26"> </text:span><text:span text:style-name="T151">will </text:span><text:span text:style-name="T26">prefer fixed </text:span><text:span text:style-name="T152">to work at fixed </text:span><text:span text:style-name="T26">locations</text:span><text:span text:style-name="T84">.</text:span></text:p>
      <text:p text:style-name="P12"/>
      <text:p text:style-name="P35"><text:span text:style-name="T84">There </text:span><text:span text:style-name="T115">are</text:span><text:span text:style-name="T84"> n</text:span><text:span text:style-name="T42">o identification</text:span><text:span text:style-name="T53"> or background check</text:span><text:span text:style-name="T115">s</text:span><text:span text:style-name="T54"> </text:span><text:span text:style-name="T42">require</text:span><text:span text:style-name="T52">d</text:span><text:span text:style-name="T57"> to join</text:span><text:span text:style-name="T152">, no HR department</text:span><text:span text:style-name="T126"> </text:span><text:span text:style-name="T125">and no personnel records.</text:span><text:span text:style-name="T42"> </text:span><text:span text:style-name="T24">Every</text:span><text:span text:style-name="T3"> member</text:span><text:span text:style-name="T41"> </text:span><text:span text:style-name="T3">is</text:span><text:span text:style-name="T41"> </text:span><text:span text:style-name="T152">known to the system as</text:span><text:span text:style-name="T41"> a</text:span><text:span text:style-name="T19"> </text:span><text:span text:style-name="T141">cryptographic public key</text:span><text:span text:style-name="T152">.</text:span><text:span text:style-name="T41"> </text:span><text:span text:style-name="T152">The m</text:span><text:span text:style-name="T17">ember</text:span><text:span text:style-name="T41"> </text:span><text:span text:style-name="T152">is</text:span><text:span text:style-name="T41"> paid </text:span><text:span text:style-name="T128">with</text:span><text:span text:style-name="T116"> crypto</text:span><text:span text:style-name="T145">currency</text:span><text:span text:style-name="T116"> </text:span><text:span text:style-name="T19">automatically</text:span><text:span text:style-name="T141"> </text:span><text:span text:style-name="T145">as</text:span><text:span text:style-name="T141"> work completes</text:span><text:span text:style-name="T28">.</text:span></text:p>
      <text:p text:style-name="P1"/>
      <text:p text:style-name="P11"><text:span text:style-name="T113">The </text:span><text:span text:style-name="T117">minimum</text:span><text:span text:style-name="T71"> </text:span><text:span text:style-name="T152">kit </text:span><text:span text:style-name="T71">to get started is</text:span><text:span text:style-name="T1"> </text:span><text:span text:style-name="T17">a</text:span><text:span text:style-name="T53"> </text:span><text:span text:style-name="T159">reasonably-modern </text:span><text:span text:style-name="T1">smartphone</text:span><text:span text:style-name="T63"> </text:span><text:span text:style-name="T152">with</text:span><text:span text:style-name="T63"> </text:span><text:span text:style-name="T107">a </text:span><text:span text:style-name="T63">high-def</text:span><text:span text:style-name="T107">inition</text:span><text:span text:style-name="T63"> </text:span><text:span text:style-name="T142">screen, high-resolution </text:span><text:span text:style-name="T63">camera, GPS</text:span><text:span text:style-name="T113"> and</text:span><text:span text:style-name="T63"> int</text:span><text:span text:style-name="T135">ernet</text:span><text:span text:style-name="T145"> data access.</text:span><text:span text:style-name="T152"> Mobile operators will need </text:span><text:span text:style-name="T157">to provide their own</text:span><text:span text:style-name="T152"> vehicle</text:span><text:span text:style-name="T157"> and fixed</text:span><text:span text:style-name="T159">-location</text:span><text:span text:style-name="T157"> operators will </text:span><text:span text:style-name="T159">require</text:span><text:span text:style-name="T157"> their own premises.</text:span></text:p>
      <text:p text:style-name="P16"/>
      <text:p text:style-name="P11"><text:span text:style-name="T31">E</text:span><text:span text:style-name="T32">ach</text:span><text:span text:style-name="T30"> </text:span><text:span text:style-name="T18">member </text:span><text:span text:style-name="T33">must</text:span><text:span text:style-name="T26"> </text:span><text:span text:style-name="T29">establish</text:span><text:span text:style-name="T28"> </text:span><text:span text:style-name="T26">a </text:span><text:span text:style-name="T6">performance </text:span><text:span text:style-name="T7">bond</text:span><text:span text:style-name="T117"> </text:span><text:span text:style-name="T125">to</text:span><text:span text:style-name="T128"> work</text:span><text:span text:style-name="T27">. </text:span><text:span text:style-name="T24">Th</text:span><text:span text:style-name="T45">is</text:span><text:span text:style-name="T18"> </text:span><text:span text:style-name="T117">bond </text:span><text:span text:style-name="T18">is</text:span><text:span text:style-name="T110"> </text:span><text:span text:style-name="T2">held </text:span><text:span text:style-name="T125">within</text:span><text:span text:style-name="T2"> </text:span><text:span text:style-name="T29">the</text:span><text:span text:style-name="T2"> system </text:span><text:span text:style-name="T110">until</text:span><text:span text:style-name="T2"> </text:span><text:span text:style-name="T3">the member </text:span><text:span text:style-name="T2">leave</text:span><text:span text:style-name="T3">s</text:span><text:span text:style-name="T110">, at which time the system automatically returns it</text:span><text:span text:style-name="T27">. </text:span><text:span text:style-name="T21">T</text:span><text:span text:style-name="T3">he system </text:span><text:span text:style-name="T86">will </text:span><text:span text:style-name="T3">automatically </text:span><text:span text:style-name="T117">seize</text:span><text:span text:style-name="T69"> some or all of</text:span><text:span text:style-name="T50"> </text:span><text:span text:style-name="T110">th</text:span><text:span text:style-name="T126">is</text:span><text:span text:style-name="T110"> bond</text:span><text:span text:style-name="T27"> if </text:span><text:span text:style-name="T45">the</text:span><text:span text:style-name="T21"> member </text:span><text:span text:style-name="T23">is </text:span><text:span text:style-name="T126">fault</text:span><text:span text:style-name="T129">ed</text:span><text:span text:style-name="T23"> </text:span><text:span text:style-name="T118">for a</text:span><text:span text:style-name="T126"> </text:span><text:span text:style-name="T118">loss</text:span><text:span text:style-name="T159">.</text:span><text:span text:style-name="T3"> </text:span><text:span text:style-name="T85">Th</text:span><text:span text:style-name="T86">e</text:span><text:span text:style-name="T25"> </text:span><text:span text:style-name="T3">member w</text:span><text:span text:style-name="T21">ould</text:span><text:span text:style-name="T19"> </text:span><text:span text:style-name="T21">then have to </text:span><text:span text:style-name="T118">re-establish</text:span><text:span text:style-name="T25"> </text:span><text:span text:style-name="T118">the</text:span><text:span text:style-name="T69"> </text:span><text:span text:style-name="T135">balance of the </text:span><text:span text:style-name="T69">bond </text:span><text:span text:style-name="T25">in order to</text:span><text:span text:style-name="T126"> continue working</text:span><text:span text:style-name="T26">.</text:span></text:p>
      <text:p text:style-name="P53"/>
      <text:p text:style-name="P54">A member who prefers to work at a fixed location must become a "hub" or "depot" by establishing a larger bond, because the member is taking more material responsibility.</text:p>
      <text:p text:style-name="P54"/>
      <text:p text:style-name="P54">A member may elect to take on even more responsibility and act as an arbitrator when there are disputes. This role requires more capable and committed people so the performance bond required to become an arbitrator is even larger than the hub bond.</text:p>
      <text:p text:style-name="P54"/>
      <text:p text:style-name="P20"><text:span text:style-name="T87">DELIVERETH</text:span><text:span text:style-name="T142"> </text:span><text:span text:style-name="T163">employes</text:span><text:span text:style-name="T142"> a</text:span><text:span text:style-name="T126"> public blockchain</text:span><text:span text:style-name="T43">. </text:span><text:span text:style-name="T142">B</text:span><text:span text:style-name="T43">lockchain is</text:span><text:span text:style-name="T39"> pay-per-</text:span><text:span text:style-name="T163">transaction</text:span><text:span text:style-name="T71"> </text:span><text:span text:style-name="T163">so</text:span><text:span text:style-name="T142"> </text:span><text:span text:style-name="T43">the member </text:span><text:span text:style-name="T142">must </text:span><text:span text:style-name="T43">pay</text:span><text:span text:style-name="T142"> from their crypto-account</text:span><text:span text:style-name="T85"> </text:span><text:span text:style-name="T142">to make any mutable</text:span><text:span text:style-name="T43"> </text:span><text:span text:style-name="T126">transaction</text:span><text:span text:style-name="T163">s required to do business</text:span><text:span text:style-name="T43">.</text:span><text:span text:style-name="T143"> </text:span><text:span text:style-name="T159">These</text:span><text:span text:style-name="T119"> fees are a tax-deductible expense</text:span><text:span text:style-name="T126"> for the member.</text:span></text:p>
      <text:p text:style-name="P13"/>
      <text:p text:style-name="P2"/>
      <text:p text:style-name="P62"/>
      <text:p text:style-name="P44"><text:span text:style-name="T9">OUR</text:span><text:span text:style-name="T5"> </text:span><text:span text:style-name="T11">CUSTOMER</text:span></text:p>
      <text:p text:style-name="P3"/>
      <text:p text:style-name="P37"><text:span text:style-name="T35">The c</text:span><text:span text:style-name="T44">ustomer place</text:span><text:span text:style-name="T130">s</text:span><text:span text:style-name="T44"> </text:span><text:span text:style-name="T130">an </text:span><text:span text:style-name="T44">order</text:span><text:span text:style-name="T51"> </text:span><text:span text:style-name="T161">for delivery </text:span><text:span text:style-name="T136">by website</text:span><text:span text:style-name="T148"> (possibly </text:span><text:span text:style-name="T160">over</text:span><text:span text:style-name="T148"> TOR)</text:span><text:span text:style-name="T136"> or </text:span><text:span text:style-name="T160">using</text:span><text:span text:style-name="T137"> </text:span><text:span text:style-name="T160">our</text:span><text:span text:style-name="T137"> free </text:span><text:span text:style-name="T143">mobile </text:span><text:span text:style-name="T136">app</text:span><text:span text:style-name="T44">.</text:span><text:span text:style-name="T46"> There are no </text:span><text:span text:style-name="T131">limitations</text:span><text:span text:style-name="T46"> </text:span><text:span text:style-name="T131">on</text:span><text:span text:style-name="T46"> </text:span><text:span text:style-name="T47">order contents, </text:span><text:span text:style-name="T94">weight, </text:span><text:span text:style-name="T47">destination or</text:span><text:span text:style-name="T94"> </text:span><text:span text:style-name="T47">packaging</text:span><text:span text:style-name="T131">, as long as it is retrievable</text:span><text:span text:style-name="T161"> and transportable</text:span><text:span text:style-name="T131">.</text:span></text:p>
      <text:p text:style-name="P49"/>
      <text:p text:style-name="P14"><text:span text:style-name="T95">The c</text:span><text:span text:style-name="T47">ustomer</text:span><text:span text:style-name="T94"> </text:span><text:span text:style-name="T129">may </text:span><text:span text:style-name="T132">or may not </text:span><text:span text:style-name="T47">indicate </text:span><text:span text:style-name="T67">the order's</text:span><text:span text:style-name="T47"> value</text:span><text:span text:style-name="T95"> -</text:span><text:span text:style-name="T47"> </text:span><text:span text:style-name="T95">t</text:span><text:span text:style-name="T47">he system will a</text:span><text:span text:style-name="T129">utomatically assign</text:span><text:span text:style-name="T47"> </text:span><text:span text:style-name="T129">a</text:span><text:span text:style-name="T95"> default</text:span><text:span text:style-name="T47"> value if</text:span><text:span text:style-name="T58"> not</text:span><text:span text:style-name="T47">.</text:span><text:span text:style-name="T67"> </text:span><text:span text:style-name="T94">The system automatically ensures that any</text:span><text:span text:style-name="T67"> member cannot </text:span><text:span text:style-name="T143">take custody</text:span><text:span text:style-name="T67"> </text:span><text:span text:style-name="T143">of </text:span><text:span text:style-name="T67">more value than </text:span><text:span text:style-name="T72">is covered by </text:span><text:span text:style-name="T143">their</text:span><text:span text:style-name="T121"> performance</text:span><text:span text:style-name="T67"> bond</text:span><text:span text:style-name="T75">.</text:span></text:p>
      <text:p text:style-name="P50"/>
      <text:p text:style-name="P55"><text:span text:style-name="T143">The customer </text:span><text:span text:style-name="T162">creates and prints a QR code,</text:span><text:span text:style-name="T143"> and attaches it to the order.</text:span><text:span text:style-name="T130"> </text:span><text:span text:style-name="T94">T</text:span><text:span text:style-name="T44">he </text:span><text:span text:style-name="T162">app</text:span><text:span text:style-name="T44"> calculate</text:span><text:span text:style-name="T162">s the bounty</text:span><text:span text:style-name="T44"> </text:span><text:span text:style-name="T46">from</text:span><text:span text:style-name="T44"> the order details</text:span><text:span text:style-name="T72"> and based on the number of "hops" </text:span><text:span text:style-name="T162">expected</text:span><text:span text:style-name="T130"> to complete </text:span><text:span text:style-name="T166">delivery</text:span><text:span text:style-name="T143">.</text:span><text:span text:style-name="T164"> </text:span><text:span text:style-name="T143">The customer pays for the service with cryptocurrency, thus </text:span><text:span text:style-name="T130">establish</text:span><text:span text:style-name="T143">ing</text:span><text:span text:style-name="T130"> a bounty that will be </text:span><text:span text:style-name="T143">divided equally amon</text:span><text:span text:style-name="T148">g</text:span><text:span text:style-name="T143">st the member(s) who fulfill the order</text:span><text:span text:style-name="T130">. </text:span></text:p>
      <text:p text:style-name="P56"/>
      <text:p text:style-name="P36"><text:span text:style-name="T130">Once the order is created, any</text:span><text:span text:style-name="T46"> mobile member </text:span><text:span text:style-name="T130">may</text:span><text:span text:style-name="T46"> </text:span><text:span text:style-name="T72">notice and</text:span><text:span text:style-name="T130"> </text:span><text:span text:style-name="T47">retrieve</text:span><text:span text:style-name="T46"> the item</text:span><text:span text:style-name="T130">.</text:span><text:span text:style-name="T47"> </text:span><text:span text:style-name="T130">T</text:span><text:span text:style-name="T47">he customer </text:span><text:span text:style-name="T96">may</text:span><text:span text:style-name="T47"> </text:span><text:span text:style-name="T130">interact directly or </text:span><text:span text:style-name="T47">leave the item</text:span><text:span text:style-name="T73"> somewhere convenient such as a porch or front desk of an office</text:span><text:span text:style-name="T47">. </text:span><text:span text:style-name="T130">If left</text:span><text:span text:style-name="T143"> unattended</text:span><text:span text:style-name="T130">, t</text:span><text:span text:style-name="T47">he customer </text:span><text:span text:style-name="T130">assumes </text:span><text:span text:style-name="T143">liability for </text:span><text:span text:style-name="T49">the loss</text:span><text:span text:style-name="T120"> i</text:span><text:span text:style-name="T47">f the item is stolen or damaged </text:span><text:span text:style-name="T49">before</text:span><text:span text:style-name="T143"> being picked up.</text:span></text:p>
      <text:p text:style-name="P51"/>
      <text:p text:style-name="P52"><text:span text:style-name="T8">Note</text:span><text:span text:style-name="T139">: </text:span><text:span text:style-name="T46">S</text:span><text:span text:style-name="T45">avvy members </text:span><text:span text:style-name="T72">w</text:span><text:span text:style-name="T165">ould</text:span><text:span text:style-name="T95"> </text:span><text:span text:style-name="T46">carry</text:span><text:span text:style-name="T45"> a</text:span><text:span text:style-name="T46"> label</text:span><text:span text:style-name="T132"> </text:span><text:span text:style-name="T46">printer to </text:span><text:span text:style-name="T95">assist </text:span><text:span text:style-name="T108">those </text:span><text:span text:style-name="T95">customers</text:span><text:span text:style-name="T132"> </text:span><text:span text:style-name="T95">without</text:span><text:span text:style-name="T97"> one</text:span><text:span text:style-name="T95">.</text:span></text:p>
      <text:p text:style-name="P52"/>
      <text:p text:style-name="P4"><text:span text:style-name="T167">Upon</text:span><text:span text:style-name="T47"> pickup,</text:span><text:span text:style-name="T143"> and any time custody of the order is transferred,</text:span><text:span text:style-name="T47"> the member scans the QR code </text:span><text:span text:style-name="T96">and </text:span><text:span text:style-name="T165">mak</text:span><text:span text:style-name="T143">es a blockchain transaction</text:span><text:span text:style-name="T165"> to declare possession</text:span><text:span text:style-name="T47">. </text:span><text:span text:style-name="T96">T</text:span><text:span text:style-name="T89">he customer</text:span><text:span text:style-name="T47"> can </text:span><text:span text:style-name="T96">thereafter </text:span><text:span text:style-name="T47">use the website to view timestamps</text:span><text:span text:style-name="T48"> </text:span><text:span text:style-name="T47">and locations where the order has b</text:span><text:span text:style-name="T96">een handled</text:span><text:span text:style-name="T49"> and</text:span><text:span text:style-name="T47"> see </text:span><text:span text:style-name="T143">how </text:span><text:span text:style-name="T73">it</text:span><text:span text:style-name="T47"> </text:span><text:span text:style-name="T143">is </text:span><text:span text:style-name="T47">progressing</text:span><text:span text:style-name="T49">.</text:span><text:span text:style-name="T58"> </text:span><text:span text:style-name="T96">T</text:span><text:span text:style-name="T58">he last member in the chain </text:span><text:span text:style-name="T143">of custody, the one who completed the order makes a transaction to </text:span><text:span text:style-name="T96">record the order as </text:span><text:span text:style-name="T58">complete.</text:span></text:p>
      <text:p text:style-name="P4"/>
      <text:p text:style-name="P60"><text:span text:style-name="T96">T</text:span><text:span text:style-name="T50">he customer</text:span><text:span text:style-name="T97"> </text:span><text:span text:style-name="T167">may</text:span><text:span text:style-name="T50"> </text:span><text:span text:style-name="T167">ask for arbitration in the event the package has not been delivered </text:span><text:span text:style-name="T171">or arrives damaged</text:span><text:span text:style-name="T50">.</text:span><text:span text:style-name="T171"> An arbitrator will then settle the order. The system will reimburse the customer for the declared value and cost of shipping.</text:span></text:p>
      <text:p text:style-name="P61"/>
      <text:p text:style-name="P58"><text:span text:style-name="T169">When a delivery completes normally,</text:span><text:span text:style-name="T58"> </text:span><text:span text:style-name="T96">the system </text:span><text:span text:style-name="T73">automatically </text:span><text:span text:style-name="T58">pays </text:span><text:span text:style-name="T96">an equal share of the order's fee to </text:span><text:span text:style-name="T58">every member who </text:span><text:span text:style-name="T96">handl</text:span><text:span text:style-name="T58">ed the order </text:span><text:span text:style-name="T73">at any point</text:span><text:span text:style-name="T74"> in its journey</text:span><text:span text:style-name="T58">.</text:span></text:p>
      <text:p text:style-name="P6"/>
      <text:p text:style-name="P75"><text:span text:style-name="T12">OUR</text:span><text:span text:style-name="T5"> </text:span><text:span text:style-name="T13">HUB</text:span></text:p>
      <text:p text:style-name="P5"/>
      <text:p text:style-name="P59"><text:span text:style-name="T36">A network of hubs</text:span><text:span text:style-name="T37"> </text:span><text:span text:style-name="T60">support</text:span><text:span text:style-name="T149">s</text:span><text:span text:style-name="T60"> the mobile members</text:span><text:span text:style-name="T61"> </text:span><text:span text:style-name="T149">and provides customer services</text:span><text:span text:style-name="T61">.</text:span><text:span text:style-name="T78"> </text:span><text:span text:style-name="T149">The hub</text:span><text:span text:style-name="T77"> </text:span><text:span text:style-name="T149">enables </text:span><text:span text:style-name="T169">the </text:span><text:span text:style-name="T149">mobile </text:span><text:span text:style-name="T169">member</text:span><text:span text:style-name="T149"> to drop off a package for retrieval by the receiving customer or another mobile </text:span><text:span text:style-name="T169">member</text:span><text:span text:style-name="T149"> who will advance the package to the next location. </text:span><text:span text:style-name="T169">The </text:span><text:span text:style-name="T149">hub</text:span><text:span text:style-name="T77"> </text:span><text:span text:style-name="T169">member</text:span><text:span text:style-name="T77"> scans e</text:span><text:span text:style-name="T78">ach</text:span><text:span text:style-name="T77"> </text:span><text:span text:style-name="T78">incoming order and stores it temporarily for retrieval by other </text:span><text:span text:style-name="T169">mobile </text:span><text:span text:style-name="T78">members</text:span><text:span text:style-name="T169"> or by customers who choose to pickup.</text:span></text:p>
      <text:p text:style-name="P7"/>
      <text:p text:style-name="P9"><text:span text:style-name="T144">A l</text:span><text:span text:style-name="T76">ocal</text:span><text:span text:style-name="T60"> order </text:span><text:span text:style-name="T80">c</text:span><text:span text:style-name="T81">ould</text:span><text:span text:style-name="T60"> be p</text:span><text:span text:style-name="T64">icked up and completed by one member</text:span><text:span text:style-name="T122">,</text:span><text:span text:style-name="T79"> but</text:span><text:span text:style-name="T78"> </text:span><text:span text:style-name="T132">often</text:span><text:span text:style-name="T78"> the distance </text:span><text:span text:style-name="T60">will</text:span><text:span text:style-name="T65"> </text:span><text:span text:style-name="T60">be </text:span><text:span text:style-name="T144">large enough</text:span><text:span text:style-name="T60"> that a single member </text:span><text:span text:style-name="T144">would not generally</text:span><text:span text:style-name="T132"> </text:span><text:span text:style-name="T60">complete the order alone. </text:span><text:span text:style-name="T61">In </text:span><text:span text:style-name="T66">such</text:span><text:span text:style-name="T61"> case</text:span><text:span text:style-name="T66">s</text:span><text:span text:style-name="T61"> </text:span><text:span text:style-name="T79">the </text:span><text:span text:style-name="T61">m</text:span><text:span text:style-name="T60">obile </text:span><text:span text:style-name="T79">member</text:span><text:span text:style-name="T60"> will pick up </text:span><text:span text:style-name="T76">multiple </text:span><text:span text:style-name="T60">orders </text:span><text:span text:style-name="T144">from</text:span><text:span text:style-name="T78"> an</text:span><text:span text:style-name="T60"> area</text:span><text:span text:style-name="T78">, </text:span><text:span text:style-name="T144">complete the</text:span><text:span text:style-name="T78"> </text:span><text:span text:style-name="T132">close</text:span><text:span text:style-name="T144">-enough</text:span><text:span text:style-name="T78"> ones and</text:span><text:span text:style-name="T65"> </text:span><text:span text:style-name="T132">leave</text:span><text:span text:style-name="T60"> the</text:span><text:span text:style-name="T78"> re</text:span><text:span text:style-name="T79">maining orders</text:span><text:span text:style-name="T60"> </text:span><text:span text:style-name="T132">at</text:span><text:span text:style-name="T60"> a </text:span><text:span text:style-name="T170">hub</text:span><text:span text:style-name="T60">.</text:span></text:p>
      <text:p text:style-name="P8"/>
      <text:p text:style-name="P19"><text:span text:style-name="T82">Each</text:span><text:span text:style-name="T60"> </text:span><text:span text:style-name="T170">hub</text:span><text:span text:style-name="T61"> </text:span><text:span text:style-name="T60">sort</text:span><text:span text:style-name="T82">s</text:span><text:span text:style-name="T60"> and group</text:span><text:span text:style-name="T82">s</text:span><text:span text:style-name="T60"> orders by destination in a manner that makes it easy for </text:span><text:span text:style-name="T144">follow-on mobile</text:span><text:span text:style-name="T60"> members to </text:span><text:span text:style-name="T79">retrieve</text:span><text:span text:style-name="T60"> </text:span><text:span text:style-name="T144">and complete them</text:span><text:span text:style-name="T60">.</text:span></text:p>
      <text:p text:style-name="P19"/>
      <text:p text:style-name="P19"><text:span text:style-name="T82">Most m</text:span><text:span text:style-name="T79">obile</text:span><text:span text:style-name="T82"> </text:span><text:span text:style-name="T132">member</text:span><text:span text:style-name="T82">s</text:span><text:span text:style-name="T79"> </text:span><text:span text:style-name="T132">will </text:span><text:span text:style-name="T82">monitor</text:span><text:span text:style-name="T79"> </text:span><text:span text:style-name="T132">their closest </text:span><text:span text:style-name="T170">hubs</text:span><text:span text:style-name="T132"> for</text:span><text:span text:style-name="T79"> orders that can be complete</text:span><text:span text:style-name="T91">d</text:span><text:span text:style-name="T79">.</text:span><text:span text:style-name="T82"> Some m</text:span><text:span text:style-name="T61">obile members</text:span><text:span text:style-name="T60"> </text:span><text:span text:style-name="T144">may elect to</text:span><text:span text:style-name="T82"> </text:span><text:span text:style-name="T60">operate large vehicles and move </text:span><text:span text:style-name="T144">larger </text:span><text:span text:style-name="T82">batches of </text:span><text:span text:style-name="T60">orders</text:span><text:span text:style-name="T144"> between </text:span><text:span text:style-name="T170">hubs</text:span><text:span text:style-name="T144">. As the network expands, members will naturally find more effective ways of moving more orders, </text:span><text:span text:style-name="T170">to earn</text:span><text:span text:style-name="T144"> more profit.</text:span></text:p>
      <text:p text:style-name="P7"/>
      <text:p text:style-name="P23"><text:span text:style-name="T92">A normal chain of custody for an order would </text:span><text:span text:style-name="T132">include a transition</text:span><text:span text:style-name="T92"> </text:span><text:span text:style-name="T100">from </text:span><text:span text:style-name="T92">customer</text:span><text:span text:style-name="T100"> </text:span><text:span text:style-name="T92">to mobile (</text:span><text:span text:style-name="T100">1</text:span><text:span text:style-name="T92">)</text:span><text:span text:style-name="T100"> </text:span><text:span text:style-name="T92">to </text:span><text:span text:style-name="T170">hub</text:span><text:span text:style-name="T100"> (2)</text:span><text:span text:style-name="T92"> </text:span><text:span text:style-name="T132">then</text:span><text:span text:style-name="T100"> </text:span><text:span text:style-name="T146">maybe another </text:span><text:span text:style-name="T170">hub</text:span><text:span text:style-name="T100"> (3)</text:span><text:span text:style-name="T146"> then</text:span><text:span text:style-name="T92"> mobile</text:span><text:span text:style-name="T100"> (</text:span><text:span text:style-name="T146">4</text:span><text:span text:style-name="T100">)</text:span><text:span text:style-name="T92"> </text:span><text:span text:style-name="T146">for</text:span><text:span text:style-name="T132"> final </text:span><text:span text:style-name="T146">delivery at</text:span><text:span text:style-name="T132"> destination</text:span><text:span text:style-name="T92">. There are </text:span><text:span text:style-name="T140">f</text:span><text:span text:style-name="T146">our</text:span><text:span text:style-name="T92"> </text:span><text:span text:style-name="T140">handlers</text:span><text:span text:style-name="T92"> in this scenario </text:span><text:span text:style-name="T140">so </text:span><text:span text:style-name="T92">payment would be split f</text:span><text:span text:style-name="T146">our</text:span><text:span text:style-name="T92"> ways.</text:span><text:span text:style-name="T100"> </text:span><text:span text:style-name="T83">Members </text:span><text:span text:style-name="T100">will </text:span><text:span text:style-name="T83">naturally </text:span><text:span text:style-name="T82">seek</text:span><text:span text:style-name="T83"> to minimize the number of </text:span><text:span text:style-name="T82">hops</text:span><text:span text:style-name="T83">, for </text:span><text:span text:style-name="T100">minimizing time to get paid </text:span><text:span text:style-name="T83">and to avoid sharing the fee more ways than necessary.</text:span></text:p>
      <text:p text:style-name="P15"/>
      <text:p text:style-name="P40"><text:span text:style-name="T100">The f</text:span><text:span text:style-name="T61">ixed location</text:span><text:span text:style-name="T100"> members</text:span><text:span text:style-name="T61"> earn a share of every order that goes through them, an equal share with the members who pick up and complete orders. This could seem like an unfair situation in favor of the member operating the </text:span><text:span text:style-name="T170">hub</text:span><text:span text:style-name="T61">, however the </text:span><text:span text:style-name="T170">hub</text:span><text:span text:style-name="T61"> operators </text:span><text:span text:style-name="T170">are critical to</text:span><text:span text:style-name="T100"> the whole network</text:span><text:span text:style-name="T61">:</text:span></text:p>
      <text:p text:style-name="P10"/>
      <text:list xml:id="list960518084" text:style-name="L2">
        <text:list-item>
          <text:p text:style-name="P70"><text:span text:style-name="T170">Hubs</text:span><text:span text:style-name="T61"> </text:span><text:span text:style-name="T170">must hold packages for some time before a mobile member can take them</text:span><text:span text:style-name="T61">.</text:span></text:p>
        </text:list-item>
        <text:list-item>
          <text:p text:style-name="P71"><text:span text:style-name="T170">Hubs</text:span><text:span text:style-name="T61"> </text:span><text:span text:style-name="T104">must</text:span><text:span text:style-name="T82"> </text:span><text:span text:style-name="T170">be</text:span><text:span text:style-name="T104"> </text:span><text:span text:style-name="T61">organize</text:span><text:span text:style-name="T170">d</text:span><text:span text:style-name="T61"> </text:span><text:span text:style-name="T170">to</text:span><text:span text:style-name="T61"> make </text:span><text:span text:style-name="T170">operations and therefore </text:span><text:span text:style-name="T82">the whole network</text:span><text:span text:style-name="T61"> efficient.</text:span></text:p>
        </text:list-item>
        <text:list-item>
          <text:p text:style-name="P70"><text:span text:style-name="T170">Hubs</text:span><text:span text:style-name="T61"> </text:span><text:span text:style-name="T170">need some</text:span><text:span text:style-name="T61"> security</text:span><text:span text:style-name="T170">,</text:span><text:span text:style-name="T133"> </text:span><text:span text:style-name="T170">incur </text:span><text:span text:style-name="T133">p</text:span><text:span text:style-name="T103">roperty</text:span><text:span text:style-name="T133"> taxes</text:span><text:span text:style-name="T103"> and</text:span><text:span text:style-name="T133"> insurance expenses</text:span><text:span text:style-name="T103"> too.</text:span></text:p>
        </text:list-item>
        <text:list-item>
          <text:p text:style-name="P73"><text:span text:style-name="T104">Fixed locations </text:span><text:span text:style-name="T82">could be </text:span><text:span text:style-name="T100">identified and </text:span><text:span text:style-name="T170">vulnerable to interference</text:span><text:span text:style-name="T104">.</text:span></text:p>
        </text:list-item>
        <text:list-item>
          <text:p text:style-name="P72"><text:span text:style-name="T170">Hub</text:span><text:span text:style-name="T62"> operators</text:span><text:span text:style-name="T82"> </text:span><text:span text:style-name="T170">must</text:span><text:span text:style-name="T62"> handl</text:span><text:span text:style-name="T170">e</text:span><text:span text:style-name="T62"> the </text:span><text:span text:style-name="T82">unusual </text:span><text:span text:style-name="T62">situations </text:span><text:span text:style-name="T82">that</text:span><text:span text:style-name="T170"> mobile members and</text:span><text:span text:style-name="T62"> software cannot</text:span><text:span text:style-name="T82">.</text:span></text:p>
        </text:list-item>
      </text:list>
      <text:p text:style-name="P38"/>
      <text:p text:style-name="P76"><text:span text:style-name="T12">OUR</text:span><text:span text:style-name="T5"> </text:span><text:span text:style-name="T14">ARBITRAT</text:span><text:span text:style-name="T5">OR</text:span></text:p>
      <text:p text:style-name="P27"/>
      <text:p text:style-name="P45"><text:span text:style-name="T105">Customers can </text:span><text:span text:style-name="T171">request arbitration for situations such as when the package has been lost or damaged</text:span><text:span text:style-name="T105">.</text:span></text:p>
      <text:p text:style-name="P45"/>
      <text:p text:style-name="P60"><text:span text:style-name="T167">Any member who has established an Arbitrator-level bond can then declare themself to be the arbitrator for this order. The Arbitrator will verify the history of the order and then force a resolution.</text:span><text:span text:style-name="T168"> The Arbitrator receives a fee for performing this service.</text:span></text:p>
      <text:p text:style-name="P57"/>
      <text:p text:style-name="P60"><text:span text:style-name="T96">The impact </text:span><text:span text:style-name="T168">is</text:span><text:span text:style-name="T96"> serious: t</text:span><text:span text:style-name="T50">he </text:span><text:span text:style-name="T109">system</text:span><text:span text:style-name="T50"> automatically </text:span><text:span text:style-name="T59">seiz</text:span><text:span text:style-name="T50">es the performance bond from the last member who had custody</text:span><text:span text:style-name="T132">,</text:span><text:span text:style-name="T96"> and no member in the order's chain of custody gets paid for that order</text:span><text:span text:style-name="T132">.</text:span><text:span text:style-name="T97"> All members </text:span><text:span text:style-name="T132">therefore </text:span><text:span text:style-name="T97">share an interest in ensuring orders are handled with care at every step</text:span><text:span text:style-name="T99">.</text:span></text:p>
      <text:p text:style-name="P60"/>
      <text:p text:style-name="P45"><text:span text:style-name="T132">Arbitration</text:span><text:span text:style-name="T90"> </text:span><text:span text:style-name="T143">may</text:span><text:span text:style-name="T50"> reimburse the customer </text:span><text:span text:style-name="T90">any</text:span><text:span text:style-name="T50"> amount up to the </text:span><text:span text:style-name="T75">declared value or the amount of the seized</text:span><text:span text:style-name="T59"> </text:span><text:span text:style-name="T50">bond</text:span><text:span text:style-name="T97">, whichever is less</text:span><text:span text:style-name="T90">.</text:span><text:span text:style-name="T97"> Any remaining amount is returned to the member </text:span><text:span text:style-name="T143">who was "slashed" </text:span><text:span text:style-name="T97">and </text:span><text:span text:style-name="T98">the arbitrator</text:span><text:span text:style-name="T132">(</text:span><text:span text:style-name="T99">s</text:span><text:span text:style-name="T132">)</text:span><text:span text:style-name="T99"> who handle</text:span><text:span text:style-name="T132">d</text:span><text:span text:style-name="T99"> the dispute</text:span><text:span text:style-name="T98">.</text:span></text:p>
      <text:p text:style-name="P63"/>
      <text:p text:style-name="P74"><text:span text:style-name="T12">OUR</text:span><text:span text:style-name="T5"> </text:span><text:span text:style-name="T15">RISKS</text:span></text:p>
      <text:p text:style-name="P18"/>
      <text:p text:style-name="P24"><text:span text:style-name="T101">Members </text:span><text:span text:style-name="T133">shall</text:span><text:span text:style-name="T101"> be </text:span><text:span text:style-name="T144">aware</text:span><text:span text:style-name="T101"> that DELIVERETH's </text:span><text:span text:style-name="T144">system </text:span><text:span text:style-name="T101">operations </text:span><text:span text:style-name="T139">may be</text:span><text:span text:style-name="T101"> recorded </text:span><text:span text:style-name="T139">unencrypted </text:span><text:span text:style-name="T101">on</text:span><text:span text:style-name="T102"> a </text:span><text:span text:style-name="T101">public </text:span><text:span text:style-name="T102">blockchain that is open and viewable by anyone with a</text:span><text:span text:style-name="T101"> computer and</text:span><text:span text:style-name="T102"> internet connection</text:span><text:span text:style-name="T101">, forever.</text:span><text:span text:style-name="T133"> Anyone could install the app and set a performance bond, even if they </text:span><text:span text:style-name="T137">intend to never work and only</text:span><text:span text:style-name="T133"> spy on operations.</text:span></text:p>
      <text:p text:style-name="P24"/>
      <text:p text:style-name="P24"><text:span text:style-name="T144">All m</text:span><text:span text:style-name="T102">embers are</text:span><text:span text:style-name="T93"> </text:span><text:span text:style-name="T102">pseudo-anonymous, meaning they </text:span><text:span text:style-name="T101">remain</text:span><text:span text:style-name="T102"> anonymous as long as nobody can </text:span><text:span text:style-name="T101">link</text:span><text:span text:style-name="T102"> their </text:span><text:span text:style-name="T144">cryptocurrency</text:span><text:span text:style-name="T101"> address</text:span><text:span text:style-name="T102"> to the</text:span><text:span text:style-name="T101">ir real-life identity</text:span><text:span text:style-name="T102">. A member</text:span><text:span text:style-name="T93">'</text:span><text:span text:style-name="T102">s locations and timestamps are recorded</text:span><text:span text:style-name="T144">, so</text:span><text:span text:style-name="T101"> </text:span><text:span text:style-name="T144">s</text:span><text:span text:style-name="T101">omeone observing or perhaps using the system with the ulterior purpose of identifying, or "doxxing" members could do so. Fixed</text:span><text:span text:style-name="T144">-</text:span><text:span text:style-name="T101">location members by nature are more exposed to this risk.</text:span></text:p>
      <text:p text:style-name="P17"/>
      <text:p text:style-name="P41"><text:span text:style-name="T93">DELIVERETH </text:span><text:span text:style-name="T101">is decentralized</text:span><text:span text:style-name="T103"> and </text:span><text:span text:style-name="T144">is therefore</text:span><text:span text:style-name="T103"> a natural </text:span><text:span text:style-name="T147">opponent of</text:span><text:span text:style-name="T101"> centralized </text:span><text:span text:style-name="T147">organizations</text:span><text:span text:style-name="T101"> such as competing corporations</text:span><text:span text:style-name="T103">, monopolists</text:span><text:span text:style-name="T101"> and governments that may attempt</text:span><text:span text:style-name="T93"> to </text:span><text:span text:style-name="T101">take control of</text:span><text:span text:style-name="T93"> it</text:span><text:span text:style-name="T122">.</text:span></text:p>
      <text:p text:style-name="P25"/>
      <text:p text:style-name="P39"><text:span text:style-name="T103">Some members may behave foolishly</text:span><text:span text:style-name="T144"> and illegally</text:span><text:span text:style-name="T103"> and </text:span><text:span text:style-name="T144">so </text:span><text:span text:style-name="T103">cause </text:span><text:span text:style-name="T144">losses to </text:span><text:span text:style-name="T103">other members. A member could damage an order and </text:span><text:span text:style-name="T144">try to just </text:span><text:span text:style-name="T103">pass it along, hoping the customer will not find out and complain. A member could </text:span><text:span text:style-name="T144">steal</text:span><text:span text:style-name="T103"> orders in </text:span><text:span text:style-name="T148">their</text:span><text:span text:style-name="T103"> possession, choosing to lose </text:span><text:span text:style-name="T148">their</text:span><text:span text:style-name="T103"> bond</text:span><text:span text:style-name="T106"> for some reason.</text:span></text:p>
      <text:p text:style-name="P39"/>
      <text:p text:style-name="P42"><text:span text:style-name="T144">Note: </text:span><text:span text:style-name="T147">All </text:span><text:span text:style-name="T144">DELIVERETH members have a natural and mutual responsibility to </text:span><text:span text:style-name="T171">protect</text:span><text:span text:style-name="T144"> </text:span><text:span text:style-name="T147">the system</text:span><text:span text:style-name="T144">.</text:span></text:p>
      <text:p text:style-name="P28"/>
      <text:p text:style-name="P26">Members who take part in the claim/dispute arbitration process may be exposed to unhappy customers through their <text:span text:style-name="T147">activities.</text:span></text:p>
      <text:p text:style-name="P26"/>
      <text:p text:style-name="P77"><text:span text:style-name="T12">OUR</text:span><text:span text:style-name="T5"> </text:span><text:span text:style-name="T16">PARAMETERS</text:span></text:p>
      <text:p text:style-name="P21"/>
      <text:p text:style-name="P21"/>
      <text:p text:style-name="P29">All <text:span text:style-name="T133">the following </text:span>numbers are <text:span text:style-name="T4">wild guesses</text:span><text:span text:style-name="T133">.</text:span></text:p>
      <text:p text:style-name="P29"/>
      <text:p text:style-name="P21"/>
      <text:p text:style-name="P22">Minimum amount of member performance bond<text:span text:style-name="T147">: </text:span>$1000</text:p>
      <text:p text:style-name="P21"/>
      <text:p text:style-name="P21">Amount of value assumed in an order if the customer does not specify<text:span text:style-name="T147">: </text:span>$100</text:p>
      <text:p text:style-name="P21"/>
      <text:p text:style-name="P21">Minimum time between placing a performance bond and receiving first paycheck<text:span text:style-name="T147">: </text:span>7 - 10 days</text:p>
      <text:p text:style-name="P21"/>
      <text:p text:style-name="P21">Length of time a customer has after an order has been recorded as completed to file a complaint that the order failed to arrive or was damaged<text:span text:style-name="T147">: </text:span>7 days</text:p>
      <text:p text:style-name="P21"/>
      <text:p text:style-name="P21">Blockchain transaction fee<text:span text:style-name="T147">: </text:span>$0.50</text:p>
      <text:p text:style-name="P21"/>
      <text:p text:style-name="P43"><text:span text:style-name="T172">System fee per order</text:span><text:span text:style-name="T147">: </text:span><text:span text:style-name="T171">1</text:span><text:span text:style-name="T172">% of order </text:span><text:span text:style-name="T171">bounty</text:span></text:p>
      <text:p text:style-name="P21"/>
      <text:p text:style-name="P21">Price paid by customer per estimated hop<text:span text:style-name="T147">: </text:span>$2.50</text:p>
      <text:p text:style-name="P21"/>
      <text:p text:style-name="P21">Typical cost per order<text:span text:style-name="T147">: </text:span>$10.00 - $20.00</text:p>
      <text:p text:style-name="P21"/>
      <text:p text:style-name="P21">Fee paid to each arbitrator for voting on a resolution to a dispute<text:span text:style-name="T147">: </text:span>$2.00</text:p>
      <text:p text:style-name="P21"/>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7:47:10.383696451</meta:creation-date>
    <dc:date>2026-06-30T15:36:38.294149831</dc:date>
    <meta:editing-duration>PT3H7M11S</meta:editing-duration>
    <meta:editing-cycles>22</meta:editing-cycles>
    <meta:generator>LibreOffice/6.4.7.2$Linux_X86_64 LibreOffice_project/40$Build-2</meta:generator>
    <meta:document-statistic meta:table-count="0" meta:image-count="0" meta:object-count="0" meta:page-count="7" meta:paragraph-count="62" meta:word-count="1742" meta:character-count="10523" meta:non-whitespace-character-count="8851"/>
  </office:meta>
</office:document-meta>
</file>